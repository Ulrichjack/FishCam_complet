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style:line-height-at-least="0.2917in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Horizontal_20_Line">
      <style:text-properties fo:color="#000000" loext:opacity="100%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paragraph-properties fo:margin-left="0in" fo:margin-right="0in" fo:margin-top="0in" fo:margin-bottom="0.1874in" style:contextual-spacing="false" style:line-height-at-least="0.2189in" fo:orphans="2" fo:widows="2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1" style:family="paragraph" style:parent-style-name="Text_20_body" style:list-style-name="L5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2" style:family="paragraph" style:parent-style-name="Text_20_body" style:list-style-name="L6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3" style:family="paragraph" style:parent-style-name="Text_20_body" style:list-style-name="L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4" style:family="paragraph" style:parent-style-name="Text_20_body" style:list-style-name="L9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5" style:family="paragraph" style:parent-style-name="Text_20_body" style:list-style-name="L10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6" style:family="paragraph" style:parent-style-name="Text_20_body" style:list-style-name="L1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7" style:family="paragraph" style:parent-style-name="Text_20_body" style:list-style-name="L12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8" style:family="paragraph" style:parent-style-name="Text_20_body" style:list-style-name="L1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19" style:family="paragraph" style:parent-style-name="Text_20_body" style:list-style-name="L1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0" style:family="paragraph" style:parent-style-name="Text_20_body" style:list-style-name="L15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1" style:family="paragraph" style:parent-style-name="Text_20_body" style:list-style-name="L16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2" style:family="paragraph" style:parent-style-name="Text_20_body" style:list-style-name="L1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3" style:family="paragraph" style:parent-style-name="Text_20_body" style:list-style-name="L18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4" style:family="paragraph" style:parent-style-name="Text_20_body" style:list-style-name="L19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5" style:family="paragraph" style:parent-style-name="Text_20_body" style:list-style-name="L20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6" style:family="paragraph" style:parent-style-name="Text_20_body" style:list-style-name="L2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7" style:family="paragraph" style:parent-style-name="Text_20_body" style:list-style-name="L22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8" style:family="paragraph" style:parent-style-name="Text_20_body" style:list-style-name="L2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9" style:family="paragraph" style:parent-style-name="Text_20_body" style:list-style-name="L2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30" style:family="paragraph" style:parent-style-name="Text_20_body" style:list-style-name="L25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31" style:family="paragraph" style:parent-style-name="Text_20_body" style:list-style-name="L26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32" style:family="paragraph" style:parent-style-name="Text_20_body" style:list-style-name="L2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33" style:family="paragraph" style:parent-style-name="Text_20_body">
      <style:paragraph-properties fo:margin-left="0in" fo:margin-right="0in" fo:margin-top="0in" fo:margin-bottom="0.1874in" style:contextual-spacing="false" style:line-height-at-least="0.2189in" fo:orphans="2" fo:widows="2" fo:text-indent="0in" style:auto-text-indent="fals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34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35" style:family="paragraph" style:parent-style-name="Text_20_body" style:list-style-name="L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36" style:family="paragraph" style:parent-style-name="Text_20_body" style:list-style-name="L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37" style:family="paragraph" style:parent-style-name="Text_20_body" style:list-style-name="L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38" style:family="paragraph" style:parent-style-name="Text_20_body" style:list-style-name="L8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39" style:family="paragraph" style:parent-style-name="Text_20_body" style:list-style-name="L10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0" style:family="paragraph" style:parent-style-name="Text_20_body" style:list-style-name="L1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1" style:family="paragraph" style:parent-style-name="Text_20_body" style:list-style-name="L1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2" style:family="paragraph" style:parent-style-name="Text_20_body" style:list-style-name="L16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3" style:family="paragraph" style:parent-style-name="Text_20_body" style:list-style-name="L18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4" style:family="paragraph" style:parent-style-name="Text_20_body" style:list-style-name="L19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5" style:family="paragraph" style:parent-style-name="Text_20_body" style:list-style-name="L20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6" style:family="paragraph" style:parent-style-name="Text_20_body" style:list-style-name="L2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7" style:family="paragraph" style:parent-style-name="Text_20_body" style:list-style-name="L22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8" style:family="paragraph" style:parent-style-name="Text_20_body" style:list-style-name="L2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49" style:family="paragraph" style:parent-style-name="Text_20_body" style:list-style-name="L25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50" style:family="paragraph" style:parent-style-name="Text_20_body" style:list-style-name="L2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P51" style:family="paragraph" style:parent-style-name="Text_20_body">
      <style:paragraph-properties fo:margin-left="0in" fo:margin-right="0in" fo:margin-top="0in" fo:margin-bottom="0.1874in" style:contextual-spacing="false" style:line-height-at-least="0.2189in" fo:orphans="2" fo:widows="2" fo:text-indent="0in" style:auto-text-indent="fals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2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3" style:family="paragraph" style:parent-style-name="Text_20_body" style:list-style-name="L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4" style:family="paragraph" style:parent-style-name="Text_20_body" style:list-style-name="L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5" style:family="paragraph" style:parent-style-name="Text_20_body" style:list-style-name="L8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6" style:family="paragraph" style:parent-style-name="Text_20_body" style:list-style-name="L1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7" style:family="paragraph" style:parent-style-name="Text_20_body" style:list-style-name="L19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8" style:family="paragraph" style:parent-style-name="Text_20_body" style:list-style-name="L2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59" style:family="paragraph" style:parent-style-name="Text_20_body" style:list-style-name="L2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60" style:family="paragraph" style:parent-style-name="Text_20_body" style:list-style-name="L2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P61" style:family="paragraph" style:parent-style-name="Text_20_body">
      <style:paragraph-properties fo:margin-left="0in" fo:margin-right="0in" fo:margin-top="0in" fo:margin-bottom="0.1874in" style:contextual-spacing="false" style:line-height-at-least="0.2189in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style:font-name="Inter" fo:font-style="normal" fo:font-weight="normal"/>
    </style:style>
    <style:style style:name="T2" style:family="text">
      <style:text-properties style:font-name="Inter" fo:font-size="10.5pt" fo:font-style="italic" fo:font-weight="normal"/>
    </style:style>
    <style:style style:name="T3" style:family="text">
      <style:text-properties fo:font-variant="normal" fo:text-transform="none" fo:color="#d4d4d4" loext:opacity="100%" style:font-name="Inter" fo:font-size="10.5pt" fo:letter-spacing="normal" fo:font-style="normal" fo:font-weight="normal"/>
    </style:style>
    <style:style style:name="T4" style:family="text">
      <style:text-properties fo:font-variant="normal" fo:text-transform="none" fo:color="#d4d4d4" loext:opacity="100%" style:font-name="Inter" fo:font-size="10.5pt" fo:letter-spacing="normal" fo:font-style="italic" fo:font-weight="normal"/>
    </style:style>
    <style:style style:name="T5" style:family="text">
      <style:text-properties fo:font-variant="normal" fo:text-transform="none" fo:color="#d4d4d4" loext:opacity="100%" style:font-name="Inter" fo:letter-spacing="normal" fo:font-style="normal" fo:font-weight="normal"/>
    </style:style>
    <style:style style:name="T6" style:family="text">
      <style:text-properties fo:font-variant="normal" fo:text-transform="none" style:font-name="Inter" fo:font-size="10.5pt" fo:letter-spacing="normal" fo:font-style="normal" fo:font-weight="normal"/>
    </style:style>
    <style:style style:name="T7" style:family="text">
      <style:text-properties fo:font-variant="normal" fo:text-transform="none" style:font-name="Inter" fo:font-size="10.5pt" fo:letter-spacing="normal" fo:font-style="italic" fo:font-weight="normal"/>
    </style:style>
    <style:style style:name="T8" style:family="text">
      <style:text-properties fo:font-variant="normal" fo:text-transform="none" style:font-name="Inter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Inter" fo:font-size="10.5pt" fo:letter-spacing="normal" fo:font-style="italic" fo:font-weight="normal"/>
    </style:style>
    <style:style style:name="T11" style:family="text">
      <style:text-properties fo:font-variant="normal" fo:text-transform="none" fo:color="#000000" loext:opacity="100%" style:font-name="Inter" fo:letter-spacing="normal" fo:font-style="normal" fo:font-weight="normal"/>
    </style:style>
    <style:style style:name="T12" style:family="text">
      <style:text-properties fo:font-style="italic"/>
    </style:style>
    <style:style style:name="T13" style:family="text">
      <style:text-properties style:font-name="DM Mono" loext:padding="0in" loext:border="none"/>
    </style:style>
    <style:style style:name="T14" style:family="text">
      <style:text-properties fo:color="#fcfcfc" loext:opacity="100%" style:font-name="DM Mono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L'objectif est d'être très visuel et direct. Les employés d'une poissonnerie n'ont pas le temps de lire de longs paragraphes. Utilise des puces, du gras, et laisseC'est parti ! Voici les textes complets pour tes </text:span><text:span text:style-name="Strong_20_Emphasis"><text:span text:style-name="T9">Fiches Réflexes (Guides Utilisateurs)</text:span></text:span><text:span text:style-name="T9">.</text:span></text:p>
      <text:p text:style-name="P33">La structure est pensée pour être claire, visuelle et rassurante pour des personnes qui ne sont pas forcément très à l'aise avec l'informatique.</text:p>
      <text:p text:style-name="P61">👉 <text:span text:style-name="T2">Conseil de mise en page (Word/Canva) : Mets une grande capture d'écran en haut de chaque section, encercle les boutons en rouge, et mets des numéros (1, 2, 3) qui correspondent au texte.</text:span></text:p>
      <text:p text:style-name="P5"/>
      <text:h text:style-name="P1" text:outline-level="1">📘 <text:span text:style-name="T1">GUIDE UTILISATEUR : LA CAISSIÈRE</text:span></text:h>
      <text:p text:style-name="P7"><text:span text:style-name="Strong_20_Emphasis"><text:span text:style-name="T9">Votre rôle :</text:span></text:span><text:span text:style-name="T9"> Vous gérez l'argent physique, les remboursements des clients, et les comptes d'épargne. Vous êtes le cœur financier de la poissonnerie.</text:span></text:p>
      <text:h text:style-name="P2" text:outline-level="3">1. Gérer les Dettes (Emprunts &amp; Remboursements)</text:h>
      <text:p text:style-name="P51">Quand un client prend du poisson à crédit ou vient payer une ancienne dette.</text:p>
      <text:list text:style-name="L1">
        <text:list-item>
          <text:p text:style-name="P8"><text:span text:style-name="T9">Cliquez sur le menu </text:span><text:span text:style-name="Strong_20_Emphasis"><text:span text:style-name="T9">"Clients"</text:span></text:span><text:span text:style-name="T9"> à gauche.</text:span></text:p>
        </text:list-item>
        <text:list-item>
          <text:p text:style-name="P34">Cherchez le nom du client dans la barre de recherche en haut.</text:p>
        </text:list-item>
        <text:list-item>
          <text:p text:style-name="P8"><text:span text:style-name="T9">Cliquez sur le bouton vert </text:span><text:span text:style-name="Strong_20_Emphasis"><text:span text:style-name="T9">"Détails"</text:span></text:span><text:span text:style-name="T9"> (l'œil) à côté de son nom.</text:span></text:p>
        </text:list-item>
        <text:list-item>
          <text:p text:style-name="P8"><text:span text:style-name="T9">Regardez la case </text:span><text:span text:style-name="Strong_20_Emphasis"><text:span text:style-name="T9">"Solde actuel"</text:span></text:span><text:span text:style-name="T9"> de la place pour tes captures d'écran.</text:span></text:p>
        </text:list-item>
      </text:list>
      <text:p text:style-name="P5"/>
      <text:h text:style-name="P3" text:outline-level="3">📄 <text:span text:style-name="T1">FICHE 1 : GUIDE DE LA CAISSIÈRE</text:span></text:h>
      <text:p text:style-name="P51">(À imprimer en Recto-Verso)</text:p>
      <text:p text:style-name="P7"><text:span text:style-name="Strong_20_Emphasis"><text:span text:style-name="T9">Titre : 🐟 FISH-CAM ERP — GUIDE CAISSIÈRE</text:span></text:span></text:p>
      <text:p text:style-name="P7"><text:span text:style-name="Strong_20_Emphasis"><text:span text:style-name="T9">1. Votre Tableau de Bord</text:span></text:span></text:p>
      <text:list text:style-name="L2">
        <text:list-item>
          <text:p text:style-name="P52">Insérer Capture d'écran du Dashboard Caissière</text:p>
        </text:list-item>
        <text:list-item>
          <text:p text:style-name="P9"><text:span text:style-name="Strong_20_Emphasis"><text:span text:style-name="T9">Votre mission :</text:span></text:span><text:span text:style-name="T9"> Vous gérez l'argent physique, les dettes des clients, et leurs épargnes.</text:span></text:p>
        </text:list-item>
        <text:list-item>
          <text:p text:style-name="P9"><text:span text:style-name="Strong_20_Emphasis"><text:span text:style-name="T9">En un coup d'œil :</text:span></text:span><text:span text:style-name="T9"> Le tableau de bord vous montre les factures du jour, le total des dettes en cours, et les dernières alertes.</text:span></text:p>
        </text:list-item>
      </text:list>
      <text:p text:style-name="P7"><text:span text:style-name="Strong_20_Emphasis"><text:span text:style-name="T9">2. Gérer les Dettes (Emprunts &amp; Remboursements)</text:span></text:span></text:p>
      <text:list text:style-name="L3">
        <text:list-item>
          <text:p text:style-name="P53">Insérer Capture d'écran de la liste des clients ou de la page "Comptes en dette"</text:p>
        </text:list-item>
        <text:list-item>
          <text:p text:style-name="P10"><text:span text:style-name="Strong_20_Emphasis"><text:span text:style-name="T9">Pour enregistrer un crédit (Emprunt) :</text:span></text:span></text:p>
          <text:list>
            <text:list-item>
              <text:p text:style-name="P10"><text:span text:style-name="T9">Allez dans le menu </text:span><text:span text:style-name="Strong_20_Emphasis"><text:span text:style-name="T9">Clients</text:span></text:span><text:span text:style-name="T9">.</text:span></text:p>
            </text:list-item>
            <text:list-item>
              <text:p text:style-name="P35">Cliquez sur le bouton jaune <text:span text:style-name="T13">[Transac.]</text:span> ou allez sur le profil du client.</text:p>
            </text:list-item>
            <text:list-item>
              <text:p text:style-name="P10"><text:span text:style-name="T9">Cliquez sur le bouton rouge </text:span><text:span text:style-name="Strong_20_Emphasis"><text:span text:style-name="T9">"Enregistrer un Emprunt"</text:span></text:span><text:span text:style-name="T9">.</text:span></text:p>
            </text:list-item>
            <text:list-item>
              <text:p text:style-name="P35"><text:soft-page-break/>Saisissez le montant et le motif (ex: "Achat 2 cartons de Bar").</text:p>
            </text:list-item>
            <text:list-item>
              <text:p text:style-name="P35"><text:span text:style-name="T12">Attention :</text:span> Si le client dépasse sa limite autorisée, le système bloquera l'opération !</text:p>
            </text:list-item>
          </text:list>
        </text:list-item>
        <text:list-item>
          <text:p text:style-name="P10"><text:span text:style-name="Strong_20_Emphasis"><text:span text:style-name="T9">Pour encaisser un remboursement :</text:span></text:span></text:p>
          <text:list>
            <text:list-item>
              <text:p text:style-name="P10"><text:span text:style-name="T9">Allez dans le menu </text:span><text:span text:style-name="Strong_20_Emphasis"><text:span text:style-name="T9">Comptes en dette</text:span></text:span><text:span text:style-name="T9"> (pour voir ceux qui doivent de l'argent).</text:span></text:p>
            </text:list-item>
            <text:list-item>
              <text:p text:style-name="P10"><text:span text:style-name="T9">Cliquez sur le bouton vert </text:span><text:span text:style-name="Strong_20_Emphasis"><text:span text:style-name="T9">"Rembourser"</text:span></text:span><text:span text:style-name="T9">.</text:span></text:p>
            </text:list-item>
            <text:list-item>
              <text:p text:style-name="P35">Saisissez le montant reçu. Le solde se mettra à jour automatiquement.</text:p>
            </text:list-item>
          </text:list>
        </text:list-item>
      </text:list>
      <text:p text:style-name="P7"><text:span text:style-name="Strong_20_Emphasis"><text:span text:style-name="T9">3. Gérer l'Épargne des Clients</text:span></text:span></text:p>
      <text:list text:style-name="L4">
        <text:list-item>
          <text:p text:style-name="P54">Insérer Capture d'écran de l'onglet "Épargne" d'un client</text:p>
        </text:list-item>
        <text:list-item>
          <text:p text:style-name="P36">**Pour garder l'argent d'un client (D : si le montant est rouge avec un signe moins (ex: -15 000 FCFA), c'est que le client a une dette.</text:p>
        </text:list-item>
      </text:list>
      <text:list text:style-name="L5">
        <text:list-item>
          <text:p text:style-name="P11"><text:span text:style-name="Strong_20_Emphasis"><text:span text:style-name="T9">Pour un crédit :</text:span></text:span><text:span text:style-name="T9"> Cliquez sur le bouton rouge </text:span><text:span text:style-name="Strong_20_Emphasis"><text:span text:style-name="T9">"Enregistrer un Emprunt"</text:span></text:span><text:span text:style-name="T9">. Entrez le montant du poisson pris, ajoutez une description (ex: "2 cartons de Bar"), et validez.</text:span></text:p>
        </text:list-item>
        <text:list-item>
          <text:p text:style-name="P11"><text:span text:style-name="Strong_20_Emphasis"><text:span text:style-name="T9">Pour un paiement :</text:span></text:span><text:span text:style-name="T9"> Cliquez sur le bouton vert </text:span><text:span text:style-name="Strong_20_Emphasis"><text:span text:style-name="T9">"Enregistrer un Remboursement"</text:span></text:span><text:span text:style-name="T9">. Entrez le montant que le client vous donne en main, et validez. L'argent est maintenant compté dans votre caisse !</text:span></text:p>
        </text:list-item>
      </text:list>
      <text:h text:style-name="P2" text:outline-level="3">2. Gérer l'Épargne (Dépôts &amp; Retraits)</text:h>
      <text:p text:style-name="P51">Quand un client veut garder son argent en sécurité à la poissonnerie.</text:p>
      <text:list text:style-name="L6">
        <text:list-item>
          <text:p text:style-name="P12"><text:span text:style-name="T9">Sur la fiche du client, cliquez sur l'onglet </text:span><text:span text:style-name="Strong_20_Emphasis"><text:span text:style-name="T9">"Épargne"</text:span></text:span><text:span text:style-name="T9"> (à côté de "Compte Courant").épôt) :**</text:span></text:p>
          <text:list>
            <text:list-item>
              <text:p text:style-name="P12"><text:span text:style-name="T9">Sur le profil du client, allez dans l'onglet </text:span><text:span text:style-name="Strong_20_Emphasis"><text:span text:style-name="T9">Épargne</text:span></text:span><text:span text:style-name="T9">.</text:span></text:p>
            </text:list-item>
            <text:list-item>
              <text:p text:style-name="P12"><text:span text:style-name="T9">Cliquez sur </text:span><text:span text:style-name="Strong_20_Emphasis"><text:span text:style-name="T9">"Faire un Dépôt"</text:span></text:span><text:span text:style-name="T9"> et saisissez le montant.</text:span></text:p>
            </text:list-item>
          </text:list>
        </text:list-item>
      </text:list>
      <text:list text:style-name="L7">
        <text:list-item>
          <text:p text:style-name="P13"><text:span text:style-name="Strong_20_Emphasis"><text:span text:style-name="T9">Pour rendre l'argent (Retrait) :</text:span></text:span></text:p>
          <text:list>
            <text:list-item>
              <text:p text:style-name="P13"><text:span text:style-name="T9">Cliquez sur </text:span><text:span text:style-name="Strong_20_Emphasis"><text:span text:style-name="T9">"Faire un Retrait"</text:span></text:span><text:span text:style-name="T9">.</text:span></text:p>
            </text:list-item>
            <text:list-item>
              <text:p text:style-name="P37"><text:span text:style-name="T12">Sécurité :</text:span> Le système vous empêchera de retirer plus que ce que le client possède.</text:p>
            </text:list-item>
          </text:list>
        </text:list-item>
      </text:list>
      <text:p text:style-name="P5"/>
      <text:h text:style-name="P3" text:outline-level="3">📄 <text:span text:style-name="T1">FICHE 2 : GUIDE DE L'ENREGISTREUR (Secrétaire d'Achat)</text:span></text:h>
      <text:p text:style-name="P51">(À imprimer sur 1 page)</text:p>
      <text:p text:style-name="P7"><text:span text:style-name="Strong_20_Emphasis"><text:span text:style-name="T9">Titre : 🐟 FISH-CAM ERP — GUIDE ENREGISTREUR</text:span></text:span></text:p>
      <text:p text:style-name="P7"><text:span text:style-name="Strong_20_Emphasis"><text:span text:style-name="T9">1. Votre Mission</text:span></text:span></text:p>
      <text:list text:style-name="L8">
        <text:list-item>
          <text:p text:style-name="P55">Insérer Capture d'écran du Dashboard Enregistreur</text:p>
        </text:list-item>
        <text:list-item>
          <text:p text:style-name="P38">Vous êtes responsable de</text:p>
        </text:list-item>
      </text:list>
      <text:list text:style-name="L9">
        <text:list-item>
          <text:p text:style-name="P14"><text:span text:style-name="Strong_20_Emphasis"><text:span text:style-name="T9">Pour garder de l'argent :</text:span></text:span><text:span text:style-name="T9"> Cliquez sur </text:span><text:span text:style-name="Strong_20_Emphasis"><text:span text:style-name="T9">"Faire un Dépôt"</text:span></text:span><text:span text:style-name="T9">. Entrez le montant que le client vous donne.</text:span></text:p>
        </text:list-item>
        <text:list-item>
          <text:p text:style-name="P14"><text:soft-page-break/><text:span text:style-name="Strong_20_Emphasis"><text:span text:style-name="T9">Pour rendre de l'argent :</text:span></text:span><text:span text:style-name="T9"> Cliquez sur </text:span><text:span text:style-name="Strong_20_Emphasis"><text:span text:style-name="T9">"Faire un Retrait"</text:span></text:span><text:span text:style-name="T9">. </text:span><text:span text:style-name="T10">Attention : le système bloquera automatiquement l'opération si le client demande plus d'argent que ce qu'il a sur son compte !</text:span></text:p>
        </text:list-item>
        <text:list-item>
          <text:p text:style-name="P14"><text:span text:style-name="T9">Vous pouvez cliquer sur </text:span><text:span text:style-name="Strong_20_Emphasis"><text:span text:style-name="T9">"Fiche PDF"</text:span></text:span><text:span text:style-name="T9"> pour imprimer ou envoyer l'historique au client.</text:span></text:p>
        </text:list-item>
      </text:list>
      <text:p text:style-name="P5"/>
      <text:h text:style-name="P1" text:outline-level="1">📗 <text:span text:style-name="T1">GUIDE UTILISATEUR : L'ENREGISTREUR</text:span></text:h>
      <text:p text:style-name="P7"><text:span text:style-name="Strong_20_Emphasis"><text:span text:style-name="T9">Votre rôle :</text:span></text:span><text:span text:style-name="T9"> Vous gérez les arrivages de marchandises. Votre travail garantit que les stocks et les prix d'achat sont toujours exacts.</text:span></text:p>
      <text:h text:style-name="P2" text:outline-level="3">1. Enregistrer une nouvelle facture fournisseur</text:h>
      <text:p text:style-name="P51">Quand le camion de livraison arrive avec la marchandise.</text:p>
      <text:list text:style-name="L10">
        <text:list-item>
          <text:p text:style-name="P15"><text:span text:style-name="T9">Cliquez sur le menu </text:span><text:span text:style-name="Strong_20_Emphasis"><text:span text:style-name="T9">"Factures / Achats"</text:span></text:span><text:span text:style-name="T9"> à gauche.</text:span></text:p>
        </text:list-item>
        <text:list-item>
          <text:p text:style-name="P15"><text:span text:style-name="T9">Cliquez sur le bouton vert </text:span><text:span text:style-name="Strong_20_Emphasis"><text:span text:style-name="T9">"Nouvelle Facture"</text:span></text:span><text:span text:style-name="T9"> en haut à droite.</text:span></text:p>
        </text:list-item>
        <text:list-item>
          <text:p text:style-name="P15"><text:span text:style-name="T9">Sélectionnez la </text:span><text:span text:style-name="Strong_20_Emphasis"><text:span text:style-name="T9">Date</text:span></text:span><text:span text:style-name="T9"> et le </text:span><text:span text:style-name="Strong_20_Emphasis"><text:span text:style-name="T9">Fournisseur</text:span></text:span><text:span text:style-name="T9"> (ex: Congelcam).</text:span></text:p>
        </text:list-item>
        <text:list-item>
          <text:p text:style-name="P39">Dans la section "Ajouter un produit", tapez le nom du poisson (ex: "Carpe"). Le système va automatiquement afficher le dernier prix connu.</text:p>
        </text:list-item>
        <text:list-item>
          <text:p text:style-name="P15"><text:span text:style-name="T9">Entrez la </text:span><text:span text:style-name="Strong_20_Emphasis"><text:span text:style-name="T9">Quantité (Cartons)</text:span></text:span><text:span text:style-name="T9"> et le </text:span><text:span text:style-name="Strong_20_Emphasis"><text:span text:style-name="T9">Prix d'achat par carton</text:span></text:span><text:span text:style-name="T9">. </text:span><text:span text:style-name="T10">Le système calculera le poids total tout seul !</text:span></text:p>
        </text:list-item>
        <text:list-item>
          <text:p text:style-name="P39">Ent la saisie exacte de la marchandise qui entre dans la poissonnerie. Vous ne gérez pas l'argent des clients.</text:p>
        </text:list-item>
      </text:list>
      <text:p text:style-name="P7"><text:span text:style-name="Strong_20_Emphasis"><text:span text:style-name="T9">2. Créer une Facture d'Achat</text:span></text:span></text:p>
      <text:list text:style-name="L11">
        <text:list-item>
          <text:p text:style-name="P56">Insérer Capture d'écran du formulaire de création de facture (Split screen)</text:p>
        </text:list-item>
        <text:list-item>
          <text:p text:style-name="P16"><text:span text:style-name="Strong_20_Emphasis"><text:span text:style-name="T9">Étape 1 : L'en-tête</text:span></text:span><text:span text:style-name="T9"><text:line-break/>rez le </text:span><text:span text:style-name="Strong_20_Emphasis"><text:span text:style-name="T9">Prix de Vente au Kg</text:span></text:span><text:span text:style-name="T9"> (le prix auquel la boutique va vendre ce poisson aujourd'hui).</text:span></text:p>
        </text:list-item>
      </text:list>
      <text:list text:style-name="L12">
        <text:list-item>
          <text:p text:style-name="P17"><text:span text:style-name="T9">Cliquez sur </text:span><text:span text:style-name="Strong_20_Emphasis"><text:span text:style-name="T9">"Ajouter la ligne"</text:span></text:span><text:span text:style-name="T9">. Répétez l'opération pour tous les poissons du camion.</text:span></text:p>
        </text:list-item>
        <text:list-item>
          <text:p text:style-name="P17"><text:span text:style-name="T9">Vérifiez le résumé à droite, puis cliquez sur </text:span><text:span text:style-name="Strong_20_Emphasis"><text:span text:style-name="T9">"Enregistrer la facture"</text:span></text:span><text:span text:style-name="T9">.</text:span></text:p>
        </text:list-item>
      </text:list>
      <text:h text:style-name="P2" text:outline-level="3">2. Évaluer le Livreur (Important !)</text:h>
      <text:p text:style-name="P51">Pour garder une trace de la qualité du service de livraison.</text:p>
      <text:list text:style-name="L13">
        <text:list-item>
          <text:p text:style-name="P40">Une fois la facture enregistrée, vous arrivez sur la page de détails.</text:p>
        </text:list-item>
        <text:list-item>
          <text:p text:style-name="P18"><text:span text:style-name="T9">Cliquez sur le bouton jaune </text:span><text:span text:style-name="Strong_20_Emphasis"><text:span text:style-name="T9">"Évaluer la livraison"</text:span></text:span><text:span text:style-name="T9">.</text:span></text:p>
        </text:list-item>
        <text:list-item>
          <text:p text:style-name="P18"><text:span text:style-name="T9">Choisissez le nom1. Allez dans le menu </text:span><text:span text:style-name="Strong_20_Emphasis"><text:span text:style-name="T9">Factures</text:span></text:span><text:span text:style-name="T9"> et cliquez sur </text:span><text:span text:style-name="Strong_20_Emphasis"><text:span text:style-name="T9">"Nouvelle Facture"</text:span></text:span><text:span text:style-name="T9">.<text:line-break/>2. Vérifiez la date et sélectionnez le </text:span><text:span text:style-name="Strong_20_Emphasis"><text:span text:style-name="T9">Fournisseur</text:span></text:span><text:span text:style-name="T9">.</text:span></text:p>
        </text:list-item>
      </text:list>
      <text:list text:style-name="L14">
        <text:list-item>
          <text:p text:style-name="P19"><text:span text:style-name="Strong_20_Emphasis"><text:span text:style-name="T9">Étape 2 : Ajouter les produits</text:span></text:span></text:p>
          <text:list>
            <text:list-item>
              <text:p text:style-name="P41">Cherchez le produit (ex: "Carpe").</text:p>
            </text:list-item>
            <text:list-item>
              <text:p text:style-name="P19"><text:span text:style-name="T9">Saisissez la </text:span><text:span text:style-name="Strong_20_Emphasis"><text:span text:style-name="T9">Quantité de cartons</text:span></text:span><text:span text:style-name="T9"> et le </text:span><text:span text:style-name="Strong_20_Emphasis"><text:span text:style-name="T9">Prix d'achat par carton</text:span></text:span><text:span text:style-name="T9">.</text:span></text:p>
            </text:list-item>
            <text:list-item>
              <text:p text:style-name="P41"><text:span text:style-name="T12">Magie :</text:span> Le système calcule automatiquement le poids total et du chauffeur.</text:p>
            </text:list-item>
          </text:list>
        </text:list-item>
      </text:list>
      <text:list text:style-name="L15">
        <text:list-item>
          <text:p text:style-name="P20"><text:soft-page-break/><text:span text:style-name="T9">Donnez une note sur 5 pour la </text:span><text:span text:style-name="Strong_20_Emphasis"><text:span text:style-name="T9">Qualité du poisson</text:span></text:span><text:span text:style-name="T9"> et le </text:span><text:span text:style-name="Strong_20_Emphasis"><text:span text:style-name="T9">Respect du poids</text:span></text:span><text:span text:style-name="T9">.</text:span></text:p>
        </text:list-item>
        <text:list-item>
          <text:p text:style-name="P20"><text:span text:style-name="T9">S'il manque des cartons ou si le poisson est gâté, cochez la case </text:span><text:span text:style-name="Strong_20_Emphasis"><text:span text:style-name="T9">"Signaler un problème grave"</text:span></text:span><text:span text:style-name="T9"> et écrivez un commentaire.</text:span></text:p>
        </text:list-item>
      </text:list>
      <text:p text:style-name="P5"/>
      <text:h text:style-name="P1" text:outline-level="1">📙 <text:span text:style-name="T1">GUIDE UTILISATEUR : LE PATRON (Gérant)</text:span></text:h>
      <text:p text:style-name="P7"><text:span text:style-name="Strong_20_Emphasis"><text:span text:style-name="T9">Votre rôle :</text:span></text:span><text:span text:style-name="T9"> Vous avez le contrôle total. Vous validez les journées, surveillez les bénéfices et gérez les limites de crédit des clients.</text:span></text:p>
      <text:h text:style-name="P2" text:outline-level="3">1. Clôturer une Facture d'Achat</text:h>
      <text:p text:style-name="P7"><text:span text:style-name="T9">*Pour vous suggère le dernier prix de vente !<text:line-break/>4. Cliquez sur </text:span><text:span text:style-name="Strong_20_Emphasis"><text:span text:style-name="T9">"Ajouter la ligne"</text:span></text:span><text:span text:style-name="T9">. Recommencez pour chaque produit.</text:span></text:p>
      <text:list text:style-name="L16">
        <text:list-item>
          <text:p text:style-name="P21"><text:span text:style-name="Strong_20_Emphasis"><text:span text:style-name="T9">Étape 3 : Valider</text:span></text:span></text:p>
          <text:list>
            <text:list-item>
              <text:p text:style-name="P42">Vérifiez le résumé sur la droite (Total Achat).</text:p>
            </text:list-item>
            <text:list-item>
              <text:p text:style-name="P42">Cliquez sur le bouton vert *<text:span text:style-name="T12">"Enregistrer la facture verrouiller une facture et empêcher toute modification.</text:span></text:p>
            </text:list-item>
          </text:list>
        </text:list-item>
      </text:list>
      <text:list text:style-name="L17">
        <text:list-item>
          <text:p text:style-name="P22"><text:span text:style-name="T9">Allez dans </text:span><text:span text:style-name="Strong_20_Emphasis"><text:span text:style-name="T9">"Factures / Achats"</text:span></text:span><text:span text:style-name="T9">. Les factures avec un badge jaune "Ouverte" n'ont pas encore été validées.</text:span></text:p>
        </text:list-item>
        <text:list-item>
          <text:p text:style-name="P22"><text:span text:style-name="T9">Cliquez sur </text:span><text:span text:style-name="Strong_20_Emphasis"><text:span text:style-name="T9">"Détails"</text:span></text:span><text:span text:style-name="T9">."**.</text:span></text:p>
        </text:list-item>
      </text:list>
      <text:p text:style-name="P51">Note : Une fois enregistrée, la facture est "Ouverte". C'est le Patron (ou la Caissière principale) qui viendra la "Clôturer" après avoir vérifié physiquement les cartons.</text:p>
      <text:p text:style-name="P5"/>
      <text:h text:style-name="P3" text:outline-level="3">📄 <text:span text:style-name="T1">FICHE 3 : GUIDE DU PATRON (Gérant)</text:span></text:h>
      <text:p text:style-name="P51">(À imprimer en Recto-Verso)</text:p>
      <text:p text:style-name="P7"><text:span text:style-name="T9">Vérifiez que les quantités saisies par l'Enregistreur correspondent bien à la marchandise reçue.<text:line-break/>3. Cliquez sur le bouton rouge </text:span><text:span text:style-name="Strong_20_Emphasis"><text:span text:style-name="T9">"Clôturer"</text:span></text:span><text:span text:style-name="T9"> (le cadenas). </text:span><text:span text:style-name="T10">Attention : une fois clôturée, plus personne ne pourra modifier cette facture !</text:span></text:p>
      <text:h text:style-name="P2" text:outline-level="3">2. Modifier la Limite de Crédit d'un Client</text:h>
      <text:p text:style-name="P51">Pour autoriser un bon client à prendre plus de marchandises à crédit.</text:p>
      <text:list text:style-name="L18">
        <text:list-item>
          <text:p text:style-name="P23"><text:span text:style-name="T9">Allez dans </text:span><text:span text:style-name="Strong_20_Emphasis"><text:span text:style-name="T9">"Clients"</text:span></text:span><text:span text:style-name="T9"> et ouvrez la fiche du client.</text:span></text:p>
        </text:list-item>
        <text:list-item>
          <text:p text:style-name="P23"><text:span text:style-name="T9">Dans l'onglet "Compte Courant", cliquez sur le bouton gris </text:span><text:span text:style-name="Strong_20_Emphasis"><text:span text:style-name="T9">"Limite"</text:span></text:span><text:span text:style-name="T9"> (avec le crayon).</text:span></text:p>
        </text:list-item>
        <text:list-item>
          <text:p text:style-name="P43">Entrez le nouveau montant maximum autorisé. Si le client dépasse ce montant, la caissière ne pourra plus lui faire de crédit.</text:p>
        </text:list-item>
      </text:list>
      <text:h text:style-name="P4" text:outline-level="3"><text:span text:style-name="T11">3. Faire</text:span><text:span text:style-name="Strong_20_Emphasis"><text:span text:style-name="T11">Titre : 🐟 FISH-CAM ERP — GUIDE DU GÉRANT</text:span></text:span></text:h>
      <text:p text:style-name="P7"><text:span text:style-name="Strong_20_Emphasis"><text:span text:style-name="T9">1. La Clôture Journalière (Le plus important !)</text:span></text:span></text:p>
      <text:list text:style-name="L19">
        <text:list-item>
          <text:p text:style-name="P57"><text:soft-page-break/>Insérer Capture d'écran de la page Clôture Journalière</text:p>
        </text:list-item>
        <text:list-item>
          <text:p text:style-name="P24"><text:span text:style-name="Strong_20_Emphasis"><text:span text:style-name="T9">À faire tous les soirs à la fermeture :</text:span></text:span></text:p>
          <text:list>
            <text:list-item>
              <text:p text:style-name="P24"><text:span text:style-name="T9">Allez dans le menu </text:span><text:span text:style-name="Strong_20_Emphasis"><text:span text:style-name="T9">Clôture journalière</text:span></text:span><text:span text:style-name="T9">.</text:span></text:p>
            </text:list-item>
            <text:list-item>
              <text:p text:style-name="P44">Le système calcule pour vous l'argent qui <text:span text:style-name="T12">devrait</text:span> être dans le tiroir la Clôture Journalière (Le soir)<text:line-break/><text:span text:style-name="T12">Pour vérifier la caisse et calculer le bénéfice de la journée.</text:span></text:p>
            </text:list-item>
          </text:list>
        </text:list-item>
      </text:list>
      <text:list text:style-name="L20">
        <text:list-item>
          <text:p text:style-name="P25"><text:span text:style-name="T9">À (Ventes - Emprunts + Remboursements).<text:line-break/>3. Saisissez </text:span><text:span text:style-name="Strong_20_Emphasis"><text:span text:style-name="T9">l'argent réel</text:span></text:span><text:span text:style-name="T9"> compté dans le tiroir.<text:line-break/>4. Saisissez les dépenses de la journée (Transport, Ration).<text:line-break/>5. Le système affiche l'</text:span><text:span text:style-name="Strong_20_Emphasis"><text:span text:style-name="T9">Écart de caisse</text:span></text:span><text:span text:style-name="T9"> (Manquant ou Surplus).<text:line-break/>6. Cliquez sur **" la fin de la journée, cliquez sur le menu </text:span><text:span text:style-name="Strong_20_Emphasis"><text:span text:style-name="T9">"Clôture journalière"</text:span></text:span><text:span text:style-name="T9">.</text:span></text:p>
        </text:list-item>
        <text:list-item>
          <text:p text:style-name="P45">Le système vous affiche un résumé exact de ce qui s'est passé (Achats, Emprunts, Remboursements).</text:p>
        </text:list-item>
        <text:list-item>
          <text:p text:style-name="P25"><text:span text:style-name="T9">Dans la section "Saisie de la Caisse Physique", entrez l'</text:span><text:span text:style-name="Strong_20_Emphasis"><text:span text:style-name="T9">Argent total</text:span></text:span><text:span text:style-name="T9"> que vous avez compté dans le tiroClôturer la journée"**. Un rapport sera généré et sauvegardé.</text:span></text:p>
        </text:list-item>
      </text:list>
      <text:p text:style-name="P7"><text:span text:style-name="Strong_20_Emphasis"><text:span text:style-name="T9">2. Gérer les Limites de Crédit</text:span></text:span></text:p>
      <text:list text:style-name="L21">
        <text:list-item>
          <text:p text:style-name="P58">Insérer Capture d'écran de la modale "Modifier la limite"</text:p>
        </text:list-item>
        <text:list-item>
          <text:p text:style-name="P46">Seul le Patron peut autoriser un client à s'endetter davantage.</text:p>
          <text:list>
            <text:list-item>
              <text:p text:style-name="P46">Allez sur le profil du client (Onglet Compte Courant).</text:p>
            </text:list-item>
            <text:list-item>
              <text:p text:style-name="P26"><text:span text:style-name="T9">Cliquez sur le bouton gris </text:span><text:span text:style-name="Strong_20_Emphasis"><text:span text:style-name="T9">"Limite"</text:span></text:span><text:span text:style-name="T9">.<text:line-break/>3.ir-caisse.</text:span></text:p>
            </text:list-item>
          </text:list>
        </text:list-item>
      </text:list>
      <text:list text:style-name="L22">
        <text:list-item>
          <text:p text:style-name="P27"><text:span text:style-name="T9">Entrez le </text:span><text:span text:style-name="Strong_20_Emphasis"><text:span text:style-name="T9">Fond de caisse</text:span></text:span><text:span text:style-name="T9"> (l'argent qu'il y avait ce matin).</text:span></text:p>
        </text:list-item>
        <text:list-item>
          <text:p text:style-name="P47">Entrez les dépenses de la journée (Transport, Ration).</text:p>
        </text:list-item>
        <text:list-item>
          <text:p text:style-name="P27"><text:span text:style-name="T9">Regardez la case </text:span><text:span text:style-name="Strong_20_Emphasis"><text:span text:style-name="T9">"Écart de Caisse"</text:span></text:span><text:span text:style-name="T9"> :</text:span></text:p>
          <text:list>
            <text:list-item>
              <text:p text:style-name="P27"><text:span text:style-name="T9">S'il affiche </text:span><text:span text:style-name="Strong_20_Emphasis"><text:span text:style-name="T9">"Parfait"</text:span></text:span><text:span text:style-name="T9">, la caissière a fait un travail irréprochable.</text:span></text:p>
            </text:list-item>
            <text:list-item>
              <text:p text:style-name="P27"><text:span text:style-name="T9">S'il affiche un montant </text:span><text:span text:style-name="Strong_20_Emphasis"><text:span text:style-name="T9">Rouge</text:span></text:span><text:span text:style-name="T9">, il manque de l'argent dans le tiroir.</text:span></text:p>
            </text:list-item>
            <text:list-item>
              <text:p text:style-name="P27"><text:span text:style-name="T9">S'il affiche un montant </text:span><text:span text:style-name="Strong_20_Emphasis"><text:span text:style-name="T9">Vert</text:span></text:span><text:span text:style-name="T9">, il y a trop d'argent dans le tiroir.</text:span></text:p>
            </text:list-item>
          </text:list>
        </text:list-item>
        <text:list-item>
          <text:p text:style-name="P27"><text:span text:style-name="T9">Cliquez sur </text:span><text:span text:style-name="Strong_20_Emphasis"><text:span text:style-name="T9">"Clôturer la journée"</text:span></text:span><text:span text:style-name="T9">. Le système générera un rapport et l'enverra dans vos notifications !</text:span></text:p>
        </text:list-item>
      </text:list>
      <text:h text:style-name="P2" text:outline-level="3">4. La Sauvegarde Cloud (Sécurité des données)</text:h>
      <text:p text:style-name="P51">Pour protéger vos données en cas de panne de l'ordinateur.</text:p>
      <text:list text:style-name="L23">
        <text:list-item>
          <text:p text:style-name="P28"><text:span text:style-name="T9">Si la sauvegarde automatique échoue (coupure internet), une </text:span><text:span text:style-name="Strong_20_Emphasis"><text:span text:style-name="T9">bannière rouge</text:span></text:span><text:span text:style-name="T9"> apparaîtra en haut de votre écran.</text:span></text:p>
        </text:list-item>
        <text:list-item>
          <text:p text:style-name="P48">Connectez l'ordinateur à Internet (Wifi ou Définissez le nouveau plafond autorisé.</text:p>
        </text:list-item>
      </text:list>
      <text:p text:style-name="P7"><text:span text:style-name="Strong_20_Emphasis"><text:span text:style-name="T9">3. Analyser les Performances</text:span></text:span></text:p>
      <text:list text:style-name="L24">
        <text:list-item>
          <text:p text:style-name="P59">Insérer Capture d'écran de la page Statistiques ou Bilans</text:p>
        </text:list-item>
        <text:list-item>
          <text:p text:style-name="P29"><text:soft-page-break/><text:span text:style-name="Strong_20_Emphasis"><text:span text:style-name="T9">Statistiques :</text:span></text:span><text:span text:style-name="T9"> Visualisez les produits les plus rentables et les plus gros débiteurs.</text:span></text:p>
        </text:list-item>
        <text:list-item>
          <text:p text:style-name="P29"><text:span text:style-name="Strong_20_Emphasis"><text:span text:style-name="T9">Bilans :</text:span></text:span><text:span text:style-name="T9"> Générez le bilan financier du mois ( Modem USB).</text:span></text:p>
        </text:list-item>
      </text:list>
      <text:list text:style-name="L25">
        <text:list-item>
          <text:p text:style-name="P49">Le système fera la sauvegarde tout seul en arrière-plan et la bannière disparaîtra.</text:p>
        </text:list-item>
        <text:list-item>
          <text:p text:style-name="P30"><text:span text:style-name="T9">Vous pouvez aussi aller dans le menu </text:span><text:span text:style-name="Strong_20_Emphasis"><text:span text:style-name="T9">"Sauvegarde"</text:span></text:span><text:span text:style-name="T9"> et cliquer sur </text:span><text:span text:style-name="Strong_20_Emphasis"><text:span text:style-name="T9">"Pousser vers le Cloud"</text:span></text:span><text:span text:style-name="T9"> à tout moment pour forcer une sauvegarde.</text:span></text:p>
        </text:list-item>
      </text:list>
      <text:p text:style-name="P5"/>
      <text:p text:style-name="P33">*(Tu peux copier ces textes, ils sont rédigés avec un vocabulaire métier adapté aux poissonneries ! Dis-moi quand tu es prêt pour la Revue d'Architecture).*Total achats, ventes, dépenses, bénéfice net).</text:p>
      <text:list text:style-name="L26">
        <text:list-item>
          <text:p text:style-name="P31"><text:span text:style-name="Strong_20_Emphasis"><text:span text:style-name="T9">Récapitulatifs :</text:span></text:span><text:span text:style-name="T9"> Téléchargez l'inventaire complet en PDF pour une période donnée.</text:span></text:p>
        </text:list-item>
      </text:list>
      <text:p text:style-name="P7"><text:span text:style-name="Strong_20_Emphasis"><text:span text:style-name="T9">4. Sécurité et Sauvegarde</text:span></text:span></text:p>
      <text:list text:style-name="L27">
        <text:list-item>
          <text:p text:style-name="P60">Insérer Capture d'écran de la bannière rouge "Sauvegarde en attente"</text:p>
        </text:list-item>
        <text:list-item>
          <text:p text:style-name="P50">Le système sauvegarde automatiquement les données sur le Cloud.</text:p>
        </text:list-item>
        <text:list-item>
          <text:p text:style-name="P32"><text:span text:style-name="T9">Si le serveur perd la connexion Internet, une </text:span><text:span text:style-name="Strong_20_Emphasis"><text:span text:style-name="T9">bannière rouge</text:span></text:span><text:span text:style-name="T9"> apparaîtra. Reconnectez simplement Internet, le système fera la sauvegarde tout seul en arrière-plan !</text:span>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08:23:31.831582957</meta:creation-date>
    <dc:date>2026-06-22T08:24:09.726814177</dc:date>
    <meta:editing-duration>PT48S</meta:editing-duration>
    <meta:editing-cycles>1</meta:editing-cycles>
    <meta:document-statistic meta:table-count="0" meta:image-count="0" meta:object-count="0" meta:page-count="6" meta:paragraph-count="133" meta:word-count="1770" meta:character-count="10313" meta:non-whitespace-character-count="8762"/>
    <meta:generator>LibreOffice/24.2.7.2$Linux_X86_64 LibreOffice_project/420$Build-2</meta:generator>
  </office:meta>
</office:document-meta>
</file>